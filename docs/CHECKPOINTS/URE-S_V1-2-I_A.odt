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5cm" table:align="left"/>
    </style:style>
    <style:style style:name="Tabla1.A" style:family="table-column">
      <style:table-column-properties style:column-width="2.859cm"/>
    </style:style>
    <style:style style:name="Tabla1.B" style:family="table-column">
      <style:table-column-properties style:column-width="4.64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9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1">
      <style:paragraph-properties fo:margin-top="0cm" fo:margin-bottom="0cm" style:contextual-spacing="false"/>
    </style:style>
    <style:style style:name="P41" style:family="paragraph" style:parent-style-name="Text_20_body" style:list-style-name="L22"/>
    <style:style style:name="P42" style:family="paragraph" style:parent-style-name="Text_20_body" style:list-style-name="L22">
      <style:paragraph-properties fo:margin-top="0cm" fo:margin-bottom="0cm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3">
      <style:paragraph-properties fo:margin-top="0cm" fo:margin-bottom="0cm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5">
      <style:paragraph-properties fo:margin-top="0cm" fo:margin-bottom="0cm" style:contextual-spacing="false"/>
    </style:style>
    <style:style style:name="P49" style:family="paragraph" style:parent-style-name="Text_20_body" style:list-style-name="L26"/>
    <style:style style:name="P50" style:family="paragraph" style:parent-style-name="Text_20_body" style:list-style-name="L26">
      <style:paragraph-properties fo:margin-top="0cm" fo:margin-bottom="0cm" style:contextual-spacing="false"/>
    </style:style>
    <style:style style:name="P51" style:family="paragraph" style:parent-style-name="Text_20_body" style:list-style-name="L27"/>
    <style:style style:name="P52" style:family="paragraph" style:parent-style-name="Text_20_body" style:list-style-name="L27">
      <style:paragraph-properties fo:margin-top="0cm" fo:margin-bottom="0cm" style:contextual-spacing="false"/>
    </style:style>
    <style:style style:name="P53" style:family="paragraph" style:parent-style-name="Text_20_body" style:list-style-name="L28"/>
    <style:style style:name="P54" style:family="paragraph" style:parent-style-name="Text_20_body" style:list-style-name="L28">
      <style:paragraph-properties fo:margin-top="0cm" fo:margin-bottom="0cm" style:contextual-spacing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29">
      <style:paragraph-properties fo:margin-top="0cm" fo:margin-bottom="0cm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🧠 ESTADO ACTUAL (IMPORTANTE)</text:h>
      <text:p text:style-name="Text_20_body">Lo que te está diciendo ahora:</text:p>
      <text:section text:style-name="Sect1" text:name="code-block-viewer">
        <text:p text:style-name="P1"><text:span text:style-name="Source_20_Text">{</text:span></text:p>
        <text:p text:style-name="Preformatted_20_Text"><text:span text:style-name="Source_20_Text">"status":"ERROR",</text:span></text:p>
        <text:p text:style-name="Preformatted_20_Text"><text:span text:style-name="Source_20_Text">"message":"SynergiaBoot no disponible"</text:span></text:p>
        <text:p text:style-name="P3"><text:span text:style-name="Source_20_Text">}</text:span></text:p>
      </text:section>
      <text:p text:style-name="Text_20_body">no es un fallo del sistema en sí, sino esto:</text:p>
      <text:p text:style-name="Text_20_body">👉 el <text:span text:style-name="Strong_20_Emphasis">VISUAL OS ya está funcionando</text:span><text:line-break/>👉 pero el <text:span text:style-name="Strong_20_Emphasis">kernel (Synergia Boot) no está bien conectado en runtime del Streamlit</text:span></text:p>
      <text:p text:style-name="Horizontal_20_Line"/>
      <text:h text:style-name="Heading_20_1" text:outline-level="1">⚡ QUÉ SIGNIFICA EN SIMPLE</text:h>
      <text:p text:style-name="Text_20_body">Ya tenés:</text:p>
      <text:p text:style-name="Text_20_body">✔ UI operativa<text:line-break/>✔ input de tareas<text:line-break/>✔ selector de modos<text:line-break/>✔ bridge funcionando<text:line-break/>❌ falta conectar bien el “motor central (Boot)”</text:p>
      <text:p text:style-name="Horizontal_20_Line"/>
      <text:h text:style-name="Heading_20_1" text:outline-level="1">🧠 SIGUIENTE PASO (CLAVE DEL SISTEMA)</text:h>
      <text:p text:style-name="Text_20_body">Ahora hay 2 caminos:</text:p>
      <text:h text:style-name="Heading_20_2" text:outline-level="2">🟢 OPCIÓN 1 (rápida)</text:h>
      <text:p text:style-name="Text_20_body">Arreglamos import definitivo del Boot para que funcione ya</text:p>
      <text:h text:style-name="Heading_20_2" text:outline-level="2">🔵 OPCIÓN 2 (pro)</text:h>
      <text:p text:style-name="Text_20_body">Convertimos Synergia Boot en:</text:p>
      <text:p text:style-name="Quotations">🧠 Kernel oficial del Visual OS (modo sistema operativo real)</text:p>
      <text:p text:style-name="Horizontal_20_Line"/>
      <text:h text:style-name="Heading_20_1" text:outline-level="1">🚀 TE RECOMIENDO ESTO</text:h>
      <text:p text:style-name="Text_20_body">Ir directo a:</text:p>
      <text:h text:style-name="Heading_20_1" text:outline-level="1"><text:soft-page-break/>🔥 SYNERGIA BOOT KERNEL FIX v1</text:h>
      <text:p text:style-name="Text_20_body">Porque ahí resolvés:</text:p>
      <text:list text:style-name="L1">
        <text:list-item>
          <text:p text:style-name="P5">import estable </text:p>
        </text:list-item>
        <text:list-item>
          <text:p text:style-name="P5">ejecución real </text:p>
        </text:list-item>
        <text:list-item>
          <text:p text:style-name="P4">conexión total OS ↔ engine </text:p>
        </text:list-item>
      </text:list>
      <text:p text:style-name="Horizontal_20_Line"/>
      <text:p text:style-name="Text_20_body">Decime:</text:p>
      <text:p text:style-name="Text_20_body">👉 <text:span text:style-name="Strong_20_Emphasis">“fix boot kernel”</text:span></text:p>
      <text:p text:style-name="Text_20_body">y te lo dejo funcionando como núcleo real del sistema sin errores.</text:p>
      <text:p text:style-name="Text_20_body">Perfecto, ahora entramos en el nivel importante: <text:span text:style-name="Strong_20_Emphasis">arquitectura real tipo “motor Unreal”, pero aplicado a IA</text:span>.</text:p>
      <text:p text:style-name="Text_20_body">Te lo explico como diseño de sistema, no como idea.</text:p>
      <text:p text:style-name="Horizontal_20_Line"/>
      <text:h text:style-name="Heading_20_1" text:outline-level="1">🧠 SYNERGIA OS v2 — ARQUITECTURA NIVEL ENGINE</text:h>
      <text:h text:style-name="Heading_20_2" text:outline-level="2">⚙️ CONCEPTO CENTRAL</text:h>
      <text:p text:style-name="Text_20_body">SYNERGIA OS v2 no es un programa.</text:p>
      <text:p text:style-name="Text_20_body">Es esto:</text:p>
      <text:p text:style-name="Quotations">🧠 un <text:span text:style-name="Strong_20_Emphasis">runtime engine de agentes IA basado en grafos ejecutables en tiempo real</text:span></text:p>
      <text:p text:style-name="Text_20_body">igual concepto base que:</text:p>
      <text:p text:style-name="Text_20_body">Unreal Engine</text:p>
      <text:p text:style-name="Text_20_body">pero aplicado a:</text:p>
      <text:list text:style-name="L2">
        <text:list-item>
          <text:p text:style-name="P7">decisiones </text:p>
        </text:list-item>
        <text:list-item>
          <text:p text:style-name="P7">automatización </text:p>
        </text:list-item>
        <text:list-item>
          <text:p text:style-name="P7">generación de software </text:p>
        </text:list-item>
        <text:list-item>
          <text:p text:style-name="P6">negocios </text:p>
        </text:list-item>
      </text:list>
      <text:p text:style-name="Horizontal_20_Line"/>
      <text:h text:style-name="Heading_20_1" text:outline-level="1">🔥 1. NÚCLEO DEL SISTEMA (KERNEL ENGINE)</text:h>
      <text:p text:style-name="Text_20_body">Esto es el “corazón”:</text:p>
      <text:section text:style-name="Sect1" text:name="Sección1">
        <text:p text:style-name="P2"><text:bookmark text:name="code-block-viewer"/><text:soft-page-break/><text:span text:style-name="Source_20_Text">SYNERGIA_KERNEL</text:span></text:p>
      </text:section>
      <text:p text:style-name="Text_20_body">Funciones:</text:p>
      <text:list text:style-name="L3">
        <text:list-item>
          <text:p text:style-name="P9">ejecutar nodos </text:p>
        </text:list-item>
        <text:list-item>
          <text:p text:style-name="P9">controlar flujo </text:p>
        </text:list-item>
        <text:list-item>
          <text:p text:style-name="P9">manejar eventos </text:p>
        </text:list-item>
        <text:list-item>
          <text:p text:style-name="P9">administrar memoria </text:p>
        </text:list-item>
        <text:list-item>
          <text:p text:style-name="P8">sincronizar agentes </text:p>
        </text:list-item>
      </text:list>
      <text:p text:style-name="Text_20_body">👉 equivalente a “Game Engine Loop” en Unreal</text:p>
      <text:p text:style-name="Horizontal_20_Line"/>
      <text:h text:style-name="Heading_20_1" text:outline-level="1">🧠 2. GRAPH RUNTIME (EL MAPA VIVO)</text:h>
      <text:p text:style-name="Text_20_body">En Unreal:</text:p>
      <text:list text:style-name="L4">
        <text:list-item>
          <text:p text:style-name="P10">Blueprint graph </text:p>
        </text:list-item>
      </text:list>
      <text:p text:style-name="Text_20_body">En SYNERGIA:</text:p>
      <text:list text:style-name="L5">
        <text:list-item>
          <text:p text:style-name="P11">AI Node Graph </text:p>
        </text:list-item>
      </text:list>
      <text:p text:style-name="Horizontal_20_Line"/>
      <text:h text:style-name="Heading_20_2" text:outline-level="2">Ejemplo conceptual:</text:h>
      <text:section text:style-name="Sect1" text:name="Sección2">
        <text:p text:style-name="P1"><text:bookmark text:name="code-block-viewer Copia 1"/><text:span text:style-name="Source_20_Text">[TASK INPUT]</text:span></text:p>
        <text:p text:style-name="Preformatted_20_Text"><text:span text:style-name="Source_20_Text"><text:s text:c="5"/>↓</text:span></text:p>
        <text:p text:style-name="Preformatted_20_Text"><text:span text:style-name="Source_20_Text">[ROUTER NODE]</text:span></text:p>
        <text:p text:style-name="Preformatted_20_Text"><text:span text:style-name="Source_20_Text"><text:s text:c="5"/>↓</text:span></text:p>
        <text:p text:style-name="Preformatted_20_Text"><text:span text:style-name="Source_20_Text">[BUSINESS NODE] → define idea</text:span></text:p>
        <text:p text:style-name="Preformatted_20_Text"><text:span text:style-name="Source_20_Text"><text:s text:c="5"/>↓</text:span></text:p>
        <text:p text:style-name="Preformatted_20_Text"><text:span text:style-name="Source_20_Text">[DEV NODE] → crea arquitectura</text:span></text:p>
        <text:p text:style-name="Preformatted_20_Text"><text:span text:style-name="Source_20_Text"><text:s text:c="5"/>↓</text:span></text:p>
        <text:p text:style-name="Preformatted_20_Text"><text:span text:style-name="Source_20_Text">[BUILDER NODE] → genera código</text:span></text:p>
        <text:p text:style-name="Preformatted_20_Text"><text:span text:style-name="Source_20_Text"><text:s text:c="5"/>↓</text:span></text:p>
        <text:p text:style-name="Preformatted_20_Text"><text:span text:style-name="Source_20_Text">[OUTPUT NODE] → proyecto final</text:span></text:p>
        <text:p text:style-name="Preformatted_20_Text"><text:span text:style-name="Source_20_Text"><text:s text:c="5"/>↓</text:span></text:p>
        <text:p text:style-name="P3"><text:span text:style-name="Source_20_Text">[MEMORY NODE] → aprende</text:span></text:p>
      </text:section>
      <text:p text:style-name="Horizontal_20_Line"/>
      <text:h text:style-name="Heading_20_1" text:outline-level="1">⚡ 3. NODOS = “OBJETOS VIVOS”</text:h>
      <text:p text:style-name="Text_20_body">Cada nodo en SYNERGIA no es función simple.</text:p>
      <text:p text:style-name="Text_20_body">Es:</text:p>
      <text:h text:style-name="Heading_20_2" text:outline-level="2">🧠 NODE = AGENTE IA</text:h>
      <text:p text:style-name="Text_20_body">Tiene:</text:p>
      <text:list text:style-name="L6">
        <text:list-item>
          <text:p text:style-name="P13">estado </text:p>
        </text:list-item>
        <text:list-item>
          <text:p text:style-name="P13"><text:soft-page-break/>memoria </text:p>
        </text:list-item>
        <text:list-item>
          <text:p text:style-name="P13">comportamiento </text:p>
        </text:list-item>
        <text:list-item>
          <text:p text:style-name="P13">entrada/salida </text:p>
        </text:list-item>
        <text:list-item>
          <text:p text:style-name="P12">capacidad de decisión </text:p>
        </text:list-item>
      </text:list>
      <text:p text:style-name="Horizontal_20_Line"/>
      <text:h text:style-name="Heading_20_2" text:outline-level="2">Tipos de nodos:</text:h>
      <text:list text:style-name="L7">
        <text:list-item>
          <text:p text:style-name="P15">🟡 Business Node → estrategia </text:p>
        </text:list-item>
        <text:list-item>
          <text:p text:style-name="P15">🔵 Dev Node → código </text:p>
        </text:list-item>
        <text:list-item>
          <text:p text:style-name="P15">🟣 CMS Node → UX/UI </text:p>
        </text:list-item>
        <text:list-item>
          <text:p text:style-name="P15">🟢 Social Node → marketing </text:p>
        </text:list-item>
        <text:list-item>
          <text:p text:style-name="P15">🔴 Memory Node → aprendizaje </text:p>
        </text:list-item>
        <text:list-item>
          <text:p text:style-name="P14">⚫ Builder Node → generación de sistemas </text:p>
        </text:list-item>
      </text:list>
      <text:p text:style-name="Horizontal_20_Line"/>
      <text:h text:style-name="Heading_20_1" text:outline-level="1">🔗 4. SISTEMA DE CONEXIONES (FLOW ENGINE)</text:h>
      <text:p text:style-name="Text_20_body">Como Unreal Blueprints:</text:p>
      <text:list text:style-name="L8">
        <text:list-item>
          <text:p text:style-name="P17">conexiones = flujo de datos </text:p>
        </text:list-item>
        <text:list-item>
          <text:p text:style-name="P17">cada conexión = transferencia de contexto </text:p>
        </text:list-item>
        <text:list-item>
          <text:p text:style-name="P16">puede haber bifurcaciones </text:p>
        </text:list-item>
      </text:list>
      <text:p text:style-name="Horizontal_20_Line"/>
      <text:h text:style-name="Heading_20_2" text:outline-level="2">Tipos de flujo:</text:h>
      <text:list text:style-name="L9">
        <text:list-item>
          <text:p text:style-name="P19">secuencial </text:p>
        </text:list-item>
        <text:list-item>
          <text:p text:style-name="P19">paralelo </text:p>
        </text:list-item>
        <text:list-item>
          <text:p text:style-name="P19">condicional </text:p>
        </text:list-item>
        <text:list-item>
          <text:p text:style-name="P18">feedback loop (muy importante) </text:p>
        </text:list-item>
      </text:list>
      <text:p text:style-name="Horizontal_20_Line"/>
      <text:h text:style-name="Heading_20_1" text:outline-level="1">🧠 5. EVENT SYSTEM (CLAVE DEL “VIVO”)</text:h>
      <text:p text:style-name="Text_20_body">Esto es lo que lo hace “engine real”</text:p>
      <text:p text:style-name="Text_20_body">Eventos:</text:p>
      <text:list text:style-name="L10">
        <text:list-item>
          <text:p text:style-name="P21">on_task_received </text:p>
        </text:list-item>
        <text:list-item>
          <text:p text:style-name="P21">on_agent_complete </text:p>
        </text:list-item>
        <text:list-item>
          <text:p text:style-name="P21">on_memory_update </text:p>
        </text:list-item>
        <text:list-item>
          <text:p text:style-name="P21"><text:soft-page-break/>on_error </text:p>
        </text:list-item>
        <text:list-item>
          <text:p text:style-name="P20">on_build_finished </text:p>
        </text:list-item>
      </text:list>
      <text:p text:style-name="Text_20_body">👉 todo dispara nodos automáticamente</text:p>
      <text:p text:style-name="Horizontal_20_Line"/>
      <text:h text:style-name="Heading_20_1" text:outline-level="1">🧩 6. MEMORY GRAPH (DIFERENCIA CON UNREAL)</text:h>
      <text:p text:style-name="Text_20_body">Unreal:</text:p>
      <text:list text:style-name="L11">
        <text:list-item>
          <text:p text:style-name="P22">no tiene memoria persistente del usuario </text:p>
        </text:list-item>
      </text:list>
      <text:p text:style-name="Text_20_body">SYNERGIA:</text:p>
      <text:list text:style-name="L12">
        <text:list-item>
          <text:p text:style-name="P23">sí tiene memoria evolutiva </text:p>
        </text:list-item>
      </text:list>
      <text:p text:style-name="Text_20_body">👉 cada ejecución mejora la siguiente</text:p>
      <text:p text:style-name="Horizontal_20_Line"/>
      <text:h text:style-name="Heading_20_1" text:outline-level="1">🚀 7. RUNTIME LOOP (EL “GAME LOOP”)</text:h>
      <text:p text:style-name="Text_20_body">Como Unreal tiene:</text:p>
      <text:section text:style-name="Sect1" text:name="Sección3">
        <text:p text:style-name="P2"><text:bookmark text:name="code-block-viewer Copia 2"/><text:span text:style-name="Source_20_Text">Tick → Update → Render</text:span></text:p>
      </text:section>
      <text:p text:style-name="Text_20_body">SYNERGIA tiene:</text:p>
      <text:section text:style-name="Sect1" text:name="Sección4">
        <text:p text:style-name="P2"><text:bookmark text:name="code-block-viewer Copia 3"/><text:span text:style-name="Source_20_Text">Input → Analyze → Route → Execute → Learn → Store</text:span></text:p>
      </text:section>
      <text:p text:style-name="Horizontal_20_Line"/>
      <text:h text:style-name="Heading_20_1" text:outline-level="1">🧠 8. DIFERENCIA CRÍTICA CON UNREAL ENGINE</text:h>
      <text:p text:style-name="Text_20_body">Unreal Engine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Unreal</text:p>
            </table:table-cell>
            <table:table-cell table:style-name="Tabla1.A1" office:value-type="string">
              <text:p text:style-name="Table_20_Heading">SYNERGIA</text:p>
            </table:table-cell>
          </table:table-row>
        </table:table-header-rows>
        <table:table-row>
          <table:table-cell table:style-name="Tabla1.A1" office:value-type="string">
            <text:p text:style-name="Table_20_Contents">Simula mundos</text:p>
          </table:table-cell>
          <table:table-cell table:style-name="Tabla1.A1" office:value-type="string">
            <text:p text:style-name="Table_20_Contents">Construye sistemas reales</text:p>
          </table:table-cell>
        </table:table-row>
        <table:table-row>
          <table:table-cell table:style-name="Tabla1.A1" office:value-type="string">
            <text:p text:style-name="Table_20_Contents">Render gráfico</text:p>
          </table:table-cell>
          <table:table-cell table:style-name="Tabla1.A1" office:value-type="string">
            <text:p text:style-name="Table_20_Contents">Render de decisiones</text:p>
          </table:table-cell>
        </table:table-row>
        <table:table-row>
          <table:table-cell table:style-name="Tabla1.A1" office:value-type="string">
            <text:p text:style-name="Table_20_Contents">Gameplay</text:p>
          </table:table-cell>
          <table:table-cell table:style-name="Tabla1.A1" office:value-type="string">
            <text:p text:style-name="Table_20_Contents">Automatización</text:p>
          </table:table-cell>
        </table:table-row>
        <table:table-row>
          <table:table-cell table:style-name="Tabla1.A1" office:value-type="string">
            <text:p text:style-name="Table_20_Contents">Physics engine</text:p>
          </table:table-cell>
          <table:table-cell table:style-name="Tabla1.A1" office:value-type="string">
            <text:p text:style-name="Table_20_Contents">Cognitive engine</text:p>
          </table:table-cell>
        </table:table-row>
      </table:table>
      <text:p text:style-name="Horizontal_20_Line"/>
      <text:h text:style-name="Heading_20_1" text:outline-level="1"><text:soft-page-break/>🔥 CONCEPTO FINAL (IMPORTANTE)</text:h>
      <text:p text:style-name="Text_20_body">SYNERGIA OS v2 no es:</text:p>
      <text:p text:style-name="Text_20_body">❌ chatbot<text:line-break/>❌ framework<text:line-break/>❌ IA aislada</text:p>
      <text:p text:style-name="Text_20_body">Es:</text:p>
      <text:p text:style-name="Quotations">🧠 <text:span text:style-name="Strong_20_Emphasis">un motor de ejecución de inteligencia estructurada</text:span></text:p>
      <text:p text:style-name="Horizontal_20_Line"/>
      <text:h text:style-name="Heading_20_1" text:outline-level="1">🚀 SI LO BAJAMOS A NIVEL PRÁCTICO</text:h>
      <text:p text:style-name="Text_20_body">Lo que construiríamos después:</text:p>
      <text:h text:style-name="Heading_20_2" text:outline-level="2">🧩 SYNERGIA NODE ENGINE v1</text:h>
      <text:list text:style-name="L13">
        <text:list-item>
          <text:p text:style-name="P25">JSON graph system </text:p>
        </text:list-item>
        <text:list-item>
          <text:p text:style-name="P25">node executor (Python) </text:p>
        </text:list-item>
        <text:list-item>
          <text:p text:style-name="P25">runtime loop </text:p>
        </text:list-item>
        <text:list-item>
          <text:p text:style-name="P25">event bus </text:p>
        </text:list-item>
        <text:list-item>
          <text:p text:style-name="P24">memory store </text:p>
        </text:list-item>
      </text:list>
      <text:p text:style-name="Horizontal_20_Line"/>
      <text:h text:style-name="Heading_20_2" text:outline-level="2">🧠 SYNERGIA VISUAL ENGINE v1</text:h>
      <text:list text:style-name="L14">
        <text:list-item>
          <text:p text:style-name="P27">canvas UI (Streamlit / React) </text:p>
        </text:list-item>
        <text:list-item>
          <text:p text:style-name="P27">nodos drag &amp; drop </text:p>
        </text:list-item>
        <text:list-item>
          <text:p text:style-name="P27">conexiones visuales </text:p>
        </text:list-item>
        <text:list-item>
          <text:p text:style-name="P26">live execution </text:p>
        </text:list-item>
      </text:list>
      <text:p text:style-name="Horizontal_20_Line"/>
      <text:h text:style-name="Heading_20_2" text:outline-level="2">🔥 SYNERGIA OS v2 FINAL</text:h>
      <text:list text:style-name="L15">
        <text:list-item>
          <text:p text:style-name="P29">sistema operativo visual de IA </text:p>
        </text:list-item>
        <text:list-item>
          <text:p text:style-name="P29">tipo Unreal Engine pero de decisiones </text:p>
        </text:list-item>
        <text:list-item>
          <text:p text:style-name="P28">creación de software sin escribir código </text:p>
        </text:list-item>
      </text:list>
      <text:p text:style-name="Horizontal_20_Line"/>
      <text:h text:style-name="Heading_20_1" text:outline-level="1">⚡ RESUMEN EN UNA FRASE</text:h>
      <text:p text:style-name="Quotations">Unreal Engine construye mundos virtuales<text:line-break/>SYNERGIA OS construye sistemas inteligentes reales</text:p>
      <text:p text:style-name="Horizontal_20_Line"><text:soft-page-break/></text:p>
      <text:p text:style-name="Text_20_body">Si querés el siguiente paso lógico decime:</text:p>
      <text:p text:style-name="Text_20_body">👉 <text:span text:style-name="Strong_20_Emphasis">“diseñar node engine v1 real”</text:span></text:p>
      <text:p text:style-name="Text_20_body">y te armo la base técnica concreta (archivos + estructura + ejecución real).</text:p>
      <text:p text:style-name="Text_20_body">Podes escribir un libro completo con estos terminos URE_S-V1_2-I.A.</text:p>
      <text:p text:style-name="Text_20_body">Perfecto. Te voy a escribir esto como un <text:span text:style-name="Strong_20_Emphasis">libro técnico-conceptual completo</text:span>, usando el nombre:</text:p>
      <text:p text:style-name="Quotations">📘 <text:span text:style-name="Strong_20_Emphasis">URE_S-V1_2-I.A.</text:span></text:p>
      <text:p text:style-name="Text_20_body">Esto lo vamos a tratar como un <text:span text:style-name="Strong_20_Emphasis">documento fundacional del sistema SYNERGIA / OS v2</text:span>, pero con identidad propia.</text:p>
      <text:p text:style-name="Horizontal_20_Line"/>
      <text:h text:style-name="Heading_20_1" text:outline-level="1">📘 URE_S-V1_2-I.A.</text:h>
      <text:h text:style-name="Heading_20_2" text:outline-level="2"><text:span text:style-name="Emphasis">Universal Runtime Engine System — Version 1.2 Artificial Intelligence</text:span></text:h>
      <text:p text:style-name="Horizontal_20_Line"/>
      <text:h text:style-name="Heading_20_1" text:outline-level="1">🧠 PRÓLOGO</text:h>
      <text:p text:style-name="Text_20_body">URE_S-V1_2-I.A. no es un software.</text:p>
      <text:p text:style-name="Text_20_body">Es un concepto de arquitectura cognitiva aplicada a sistemas inteligentes.</text:p>
      <text:p text:style-name="Text_20_body">Representa la evolución de tres ideas:</text:p>
      <text:list text:style-name="L16">
        <text:list-item>
          <text:p text:style-name="P31">sistemas operativos </text:p>
        </text:list-item>
        <text:list-item>
          <text:p text:style-name="P31">motores de ejecución </text:p>
        </text:list-item>
        <text:list-item>
          <text:p text:style-name="P30">inteligencia artificial distribuida </text:p>
        </text:list-item>
      </text:list>
      <text:p text:style-name="Text_20_body">Su objetivo es simple:</text:p>
      <text:p text:style-name="Quotations">construir sistemas que no solo ejecutan código, sino que <text:span text:style-name="Strong_20_Emphasis">razonan, deciden y evolucionan</text:span></text:p>
      <text:p text:style-name="Horizontal_20_Line"/>
      <text:h text:style-name="Heading_20_1" text:outline-level="1">⚙️ CAPÍTULO 1 — EL ORIGEN DEL MOTOR</text:h>
      <text:p text:style-name="Text_20_body">Los sistemas tradicionales funcionan así:</text:p>
      <text:list text:style-name="L17">
        <text:list-item>
          <text:p text:style-name="P32">input → proceso → output </text:p>
        </text:list-item>
      </text:list>
      <text:p text:style-name="Text_20_body"><text:soft-page-break/>Pero URE_S-V1_2-I.A. redefine esto:</text:p>
      <text:section text:style-name="Sect1" text:name="Sección5">
        <text:p text:style-name="P2"><text:bookmark text:name="code-block-viewer Copia 4"/><text:span text:style-name="Source_20_Text">INPUT → INTERPRETACIÓN → DECISIÓN → EJECUCIÓN → APRENDIZAJE</text:span></text:p>
      </text:section>
      <text:p text:style-name="Text_20_body">La clave no es ejecutar.</text:p>
      <text:p text:style-name="Text_20_body">La clave es:</text:p>
      <text:p text:style-name="Quotations">entender el contexto antes de actuar</text:p>
      <text:p text:style-name="Horizontal_20_Line"/>
      <text:h text:style-name="Heading_20_1" text:outline-level="1">🧠 CAPÍTULO 2 — ARQUITECTURA COGNITIVA</text:h>
      <text:p text:style-name="Text_20_body">URE_S-V1_2-I.A. se basa en cinco capas:</text:p>
      <text:p text:style-name="Horizontal_20_Line"/>
      <text:h text:style-name="Heading_20_2" text:outline-level="2">🟡 1. INPUT LAYER</text:h>
      <text:p text:style-name="Text_20_body">Recibe:</text:p>
      <text:list text:style-name="L18">
        <text:list-item>
          <text:p text:style-name="P34">tareas </text:p>
        </text:list-item>
        <text:list-item>
          <text:p text:style-name="P34">comandos </text:p>
        </text:list-item>
        <text:list-item>
          <text:p text:style-name="P34">eventos </text:p>
        </text:list-item>
        <text:list-item>
          <text:p text:style-name="P33">objetivos </text:p>
        </text:list-item>
      </text:list>
      <text:p text:style-name="Horizontal_20_Line"/>
      <text:h text:style-name="Heading_20_2" text:outline-level="2">🔵 2. COGNITIVE LAYER</text:h>
      <text:p text:style-name="Text_20_body">Aquí ocurre lo importante:</text:p>
      <text:list text:style-name="L19">
        <text:list-item>
          <text:p text:style-name="P36">análisis semántico </text:p>
        </text:list-item>
        <text:list-item>
          <text:p text:style-name="P36">clasificación de intención </text:p>
        </text:list-item>
        <text:list-item>
          <text:p text:style-name="P35">selección de agentes </text:p>
        </text:list-item>
      </text:list>
      <text:p text:style-name="Horizontal_20_Line"/>
      <text:h text:style-name="Heading_20_2" text:outline-level="2">🟣 3. EXECUTION LAYER</text:h>
      <text:p text:style-name="Text_20_body">Se activan módulos:</text:p>
      <text:list text:style-name="L20">
        <text:list-item>
          <text:p text:style-name="P38">business </text:p>
        </text:list-item>
        <text:list-item>
          <text:p text:style-name="P38">dev </text:p>
        </text:list-item>
        <text:list-item>
          <text:p text:style-name="P38">cms </text:p>
        </text:list-item>
        <text:list-item>
          <text:p text:style-name="P38">social </text:p>
        </text:list-item>
        <text:list-item>
          <text:p text:style-name="P37">automation </text:p>
        </text:list-item>
      </text:list>
      <text:p text:style-name="Horizontal_20_Line"/>
      <text:h text:style-name="Heading_20_2" text:outline-level="2"><text:soft-page-break/>🟢 4. MEMORY LAYER</text:h>
      <text:p text:style-name="Text_20_body">Todo lo ejecutado se guarda:</text:p>
      <text:list text:style-name="L21">
        <text:list-item>
          <text:p text:style-name="P40">experiencias </text:p>
        </text:list-item>
        <text:list-item>
          <text:p text:style-name="P40">decisiones </text:p>
        </text:list-item>
        <text:list-item>
          <text:p text:style-name="P39">resultados </text:p>
        </text:list-item>
      </text:list>
      <text:p text:style-name="Horizontal_20_Line"/>
      <text:h text:style-name="Heading_20_2" text:outline-level="2">🔴 5. EVOLUTION LAYER</text:h>
      <text:p text:style-name="Text_20_body">El sistema aprende:</text:p>
      <text:list text:style-name="L22">
        <text:list-item>
          <text:p text:style-name="P42">optimiza rutas </text:p>
        </text:list-item>
        <text:list-item>
          <text:p text:style-name="P42">mejora decisiones </text:p>
        </text:list-item>
        <text:list-item>
          <text:p text:style-name="P41">ajusta agentes </text:p>
        </text:list-item>
      </text:list>
      <text:p text:style-name="Horizontal_20_Line"/>
      <text:h text:style-name="Heading_20_1" text:outline-level="1">🔗 CAPÍTULO 3 — SISTEMA DE NODOS</text:h>
      <text:p text:style-name="Text_20_body">URE_S-V1_2-I.A. funciona como un grafo vivo.</text:p>
      <text:p text:style-name="Text_20_body">Cada nodo es una entidad cognitiva:</text:p>
      <text:section text:style-name="Sect1" text:name="Sección6">
        <text:p text:style-name="P1"><text:bookmark text:name="code-block-viewer Copia 5"/><text:span text:style-name="Source_20_Text">[INPUT NODE]</text:span></text:p>
        <text:p text:style-name="Preformatted_20_Text"><text:span text:style-name="Source_20_Text"><text:s text:c="5"/>↓</text:span></text:p>
        <text:p text:style-name="Preformatted_20_Text"><text:span text:style-name="Source_20_Text">[ROUTER NODE]</text:span></text:p>
        <text:p text:style-name="Preformatted_20_Text"><text:span text:style-name="Source_20_Text"><text:s text:c="5"/>↓</text:span></text:p>
        <text:p text:style-name="Preformatted_20_Text"><text:span text:style-name="Source_20_Text">[BUSINESS NODE] → estrategia</text:span></text:p>
        <text:p text:style-name="Preformatted_20_Text"><text:span text:style-name="Source_20_Text"><text:s text:c="5"/>↓</text:span></text:p>
        <text:p text:style-name="Preformatted_20_Text"><text:span text:style-name="Source_20_Text">[DEV NODE] → construcción</text:span></text:p>
        <text:p text:style-name="Preformatted_20_Text"><text:span text:style-name="Source_20_Text"><text:s text:c="5"/>↓</text:span></text:p>
        <text:p text:style-name="Preformatted_20_Text"><text:span text:style-name="Source_20_Text">[OUTPUT NODE] → sistema generado</text:span></text:p>
        <text:p text:style-name="Preformatted_20_Text"><text:span text:style-name="Source_20_Text"><text:s text:c="5"/>↓</text:span></text:p>
        <text:p text:style-name="P3"><text:span text:style-name="Source_20_Text">[MEMORY NODE] → aprendizaje</text:span></text:p>
      </text:section>
      <text:p text:style-name="Horizontal_20_Line"/>
      <text:h text:style-name="Heading_20_1" text:outline-level="1">⚙️ CAPÍTULO 4 — MOTOR DE EJECUCIÓN (RUNTIME)</text:h>
      <text:p text:style-name="Text_20_body">El runtime no es secuencial.</text:p>
      <text:p text:style-name="Text_20_body">Es dinámico:</text:p>
      <text:list text:style-name="L23">
        <text:list-item>
          <text:p text:style-name="P44">ejecuta nodos en paralelo </text:p>
        </text:list-item>
        <text:list-item>
          <text:p text:style-name="P44">toma decisiones en tiempo real </text:p>
        </text:list-item>
        <text:list-item>
          <text:p text:style-name="P43">reconfigura flujos </text:p>
        </text:list-item>
      </text:list>
      <text:p text:style-name="Horizontal_20_Line"/>
      <text:p text:style-name="Text_20_body">Inspiración conceptual:</text:p>
      <text:p text:style-name="Text_20_body"><text:soft-page-break/>Unreal Engine</text:p>
      <text:p text:style-name="Text_20_body">Pero con una diferencia clave:</text:p>
      <text:p text:style-name="Quotations">Unreal simula mundos<text:line-break/>URE_S ejecuta inteligencia</text:p>
      <text:p text:style-name="Horizontal_20_Line"/>
      <text:h text:style-name="Heading_20_1" text:outline-level="1">🧠 CAPÍTULO 5 — AGENTES COGNITIVOS</text:h>
      <text:p text:style-name="Text_20_body">Los agentes son módulos vivos:</text:p>
      <text:h text:style-name="Heading_20_2" text:outline-level="2">🟡 Business Agent</text:h>
      <text:list text:style-name="L24">
        <text:list-item>
          <text:p text:style-name="P46">estrategia </text:p>
        </text:list-item>
        <text:list-item>
          <text:p text:style-name="P46">monetización </text:p>
        </text:list-item>
        <text:list-item>
          <text:p text:style-name="P45">mercado </text:p>
        </text:list-item>
      </text:list>
      <text:h text:style-name="Heading_20_2" text:outline-level="2">🔵 Dev Agent</text:h>
      <text:list text:style-name="L25">
        <text:list-item>
          <text:p text:style-name="P48">arquitectura </text:p>
        </text:list-item>
        <text:list-item>
          <text:p text:style-name="P48">backend </text:p>
        </text:list-item>
        <text:list-item>
          <text:p text:style-name="P47">sistemas </text:p>
        </text:list-item>
      </text:list>
      <text:h text:style-name="Heading_20_2" text:outline-level="2">🟣 CMS Agent</text:h>
      <text:list text:style-name="L26">
        <text:list-item>
          <text:p text:style-name="P50">UI/UX </text:p>
        </text:list-item>
        <text:list-item>
          <text:p text:style-name="P49">experiencia </text:p>
        </text:list-item>
      </text:list>
      <text:h text:style-name="Heading_20_2" text:outline-level="2">🟢 Social Agent</text:h>
      <text:list text:style-name="L27">
        <text:list-item>
          <text:p text:style-name="P52">marketing </text:p>
        </text:list-item>
        <text:list-item>
          <text:p text:style-name="P52">funnels </text:p>
        </text:list-item>
        <text:list-item>
          <text:p text:style-name="P51">crecimiento </text:p>
        </text:list-item>
      </text:list>
      <text:p text:style-name="Horizontal_20_Line"/>
      <text:p text:style-name="Text_20_body">Cada agente:</text:p>
      <text:list text:style-name="L28">
        <text:list-item>
          <text:p text:style-name="P54">piensa </text:p>
        </text:list-item>
        <text:list-item>
          <text:p text:style-name="P54">ejecuta </text:p>
        </text:list-item>
        <text:list-item>
          <text:p text:style-name="P53">aprende </text:p>
        </text:list-item>
      </text:list>
      <text:p text:style-name="Horizontal_20_Line"/>
      <text:h text:style-name="Heading_20_1" text:outline-level="1"><text:soft-page-break/>🔥 CAPÍTULO 6 — MEMORIA EVOLUTIVA</text:h>
      <text:p text:style-name="Text_20_body">Este es el salto evolutivo.</text:p>
      <text:p text:style-name="Text_20_body">El sistema recuerda:</text:p>
      <text:list text:style-name="L29">
        <text:list-item>
          <text:p text:style-name="P56">qué funcionó </text:p>
        </text:list-item>
        <text:list-item>
          <text:p text:style-name="P56">qué falló </text:p>
        </text:list-item>
        <text:list-item>
          <text:p text:style-name="P55">qué decisiones fueron óptimas </text:p>
        </text:list-item>
      </text:list>
      <text:p text:style-name="Horizontal_20_Line"/>
      <text:p text:style-name="Text_20_body">Esto crea:</text:p>
      <text:p text:style-name="Quotations">inteligencia acumulativa</text:p>
      <text:p text:style-name="Horizontal_20_Line"/>
      <text:h text:style-name="Heading_20_1" text:outline-level="1">⚡ CAPÍTULO 7 — PRINCIPIO FUNDAMENTAL</text:h>
      <text:p text:style-name="Text_20_body">URE_S-V1_2-I.A. se basa en una regla:</text:p>
      <text:p text:style-name="Quotations">“Cada ejecución debe mejorar la siguiente”</text:p>
      <text:p text:style-name="Horizontal_20_Line"/>
      <text:p text:style-name="Text_20_body">No es software estático.</text:p>
      <text:p text:style-name="Text_20_body">Es:</text:p>
      <text:p text:style-name="Quotations">un organismo digital en evolución</text:p>
      <text:p text:style-name="Horizontal_20_Line"/>
      <text:h text:style-name="Heading_20_1" text:outline-level="1">🚀 CAPÍTULO 8 — APLICACIÓN PRÁCTICA</text:h>
      <text:p text:style-name="Text_20_body">Este sistema permite:</text:p>
      <text:list text:style-name="L30">
        <text:list-item>
          <text:p text:style-name="P58">crear SaaS automáticamente </text:p>
        </text:list-item>
        <text:list-item>
          <text:p text:style-name="P58">generar arquitecturas backend </text:p>
        </text:list-item>
        <text:list-item>
          <text:p text:style-name="P58">diseñar sistemas completos </text:p>
        </text:list-item>
        <text:list-item>
          <text:p text:style-name="P58">automatizar negocios </text:p>
        </text:list-item>
        <text:list-item>
          <text:p text:style-name="P57">construir productos digitales sin intervención total humana </text:p>
        </text:list-item>
      </text:list>
      <text:p text:style-name="Horizontal_20_Line"/>
      <text:h text:style-name="Heading_20_1" text:outline-level="1"><text:soft-page-break/>🧩 CAPÍTULO 9 — RELACIÓN CON SYNERGIA</text:h>
      <text:p text:style-name="Text_20_body">URE_S-V1_2-I.A. es el núcleo conceptual de:</text:p>
      <text:list text:style-name="L31">
        <text:list-item>
          <text:p text:style-name="P60">SYNERGIA CORE NEXT </text:p>
        </text:list-item>
        <text:list-item>
          <text:p text:style-name="P60">SYNERGIA OS v2 </text:p>
        </text:list-item>
        <text:list-item>
          <text:p text:style-name="P59">AI Agent System </text:p>
        </text:list-item>
      </text:list>
      <text:p text:style-name="Horizontal_20_Line"/>
      <text:p text:style-name="Text_20_body">Es el “ADN” del sistema.</text:p>
      <text:p text:style-name="Horizontal_20_Line"/>
      <text:h text:style-name="Heading_20_1" text:outline-level="1">🧠 EPÍLOGO</text:h>
      <text:p text:style-name="Text_20_body">URE_S-V1_2-I.A. no es una herramienta.</text:p>
      <text:p text:style-name="Text_20_body">Es una transición de paradigma:</text:p>
      <text:p text:style-name="Quotations">de software que ejecuta instrucciones<text:line-break/>a sistemas que generan decisiones</text:p>
      <text:p text:style-name="Horizontal_20_Line"/>
      <text:h text:style-name="Heading_20_1" text:outline-level="1">🔥 FINAL</text:h>
      <text:p text:style-name="Text_20_body">Si SYNERGIA OS v2 es el sistema operativo…</text:p>
      <text:p text:style-name="Quotations">URE_S-V1_2-I.A. es el lenguaje interno de su inteligencia</text:p>
      <text:p text:style-name="Horizontal_20_Line"/>
      <text:p text:style-name="Text_20_body">Si querés el siguiente paso, puedo hacer algo más fuerte todavía:</text:p>
      <text:p text:style-name="Text_20_body">👉 convertir este libro en <text:span text:style-name="Strong_20_Emphasis">arquitectura técnica real (carpetas + código + motor ejecutable)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7T19:30:52.749700890</dc:date>
    <meta:editing-duration>PT15S</meta:editing-duration>
    <meta:editing-cycles>1</meta:editing-cycles>
    <meta:document-statistic meta:table-count="1" meta:image-count="0" meta:object-count="0" meta:page-count="12" meta:paragraph-count="291" meta:word-count="1265" meta:character-count="7443" meta:non-whitespace-character-count="6403"/>
    <meta:generator>LibreOffice/24.2.7.2$Linux_X86_64 LibreOffice_project/420$Build-2</meta:generator>
  </office:meta>
</office:document-meta>
</file>