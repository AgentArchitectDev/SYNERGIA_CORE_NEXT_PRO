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ompact" style:list-style-name="WWNum1001"/>
    <style:style style:name="P2" style:family="paragraph" style:parent-style-name="Compact" style:list-style-name="WWNum1002"/>
    <style:style style:name="P3" style:family="paragraph" style:parent-style-name="Compact" style:list-style-name="WWNum1003"/>
    <style:style style:name="P4" style:family="paragraph" style:parent-style-name="Compact" style:list-style-name="WWNum1004"/>
    <style:style style:name="P5" style:family="paragraph" style:parent-style-name="Compact" style:list-style-name="WWNum1005"/>
    <style:style style:name="P6" style:family="paragraph" style:parent-style-name="Compact" style:list-style-name="WWNum1006"/>
    <style:style style:name="P7" style:family="paragraph" style:parent-style-name="Compact" style:list-style-name="WWNum1007"/>
    <style:style style:name="P8" style:family="paragraph" style:parent-style-name="Compact" style:list-style-name="WWNum1008"/>
    <style:style style:name="P9" style:family="paragraph" style:parent-style-name="Compact" style:list-style-name="WWNum1009"/>
    <style:style style:name="P10" style:family="paragraph" style:parent-style-name="Compact" style:list-style-name="WWNum1010"/>
    <style:style style:name="P11" style:family="paragraph" style:parent-style-name="Compact" style:list-style-name="WWNum1011"/>
    <style:style style:name="P12" style:family="paragraph" style:parent-style-name="Compact" style:list-style-name="WWNum1012"/>
    <style:style style:name="P13" style:family="paragraph" style:parent-style-name="Compact" style:list-style-name="WWNum1013"/>
    <style:style style:name="P14" style:family="paragraph" style:parent-style-name="Compact" style:list-style-name="WWNum1014"/>
    <style:style style:name="P15" style:family="paragraph" style:parent-style-name="Compact" style:list-style-name="WWNum1015"/>
    <style:style style:name="P16" style:family="paragraph" style:parent-style-name="Compact" style:list-style-name="WWNum1016"/>
    <style:style style:name="P17" style:family="paragraph" style:parent-style-name="Compact" style:list-style-name="WWNum1017"/>
    <style:style style:name="P18" style:family="paragraph" style:parent-style-name="Compact" style:list-style-name="WWNum1018"/>
    <style:style style:name="P19" style:family="paragraph" style:parent-style-name="Compact" style:list-style-name="WWNum1019"/>
    <style:style style:name="P20" style:family="paragraph" style:parent-style-name="Compact" style:list-style-name="WWNum1020"/>
    <style:style style:name="P21" style:family="paragraph" style:parent-style-name="Compact" style:list-style-name="WWNum1021"/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.318cm" fo:margin-bottom="0cm" style:contextual-spacing="false"/>
    </style:style>
    <style:style style:name="P24" style:family="paragraph">
      <loext:graphic-properties draw:fill="solid" draw:fill-color="#ffffff"/>
      <style:paragraph-properties fo:text-align="cente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synergia-cms-pro-real"/>SYNERGIA CMS PRO REAL</text:h>
      <text:h text:style-name="Heading_20_2" text:outline-level="2"><text:bookmark-start text:name="Xd6a32007c6b024fc01b82d4b33ac3171ae92395"/>Libro Técnico — Arquitectura, Evolución y Sistema Visual IA</text:h>
      <text:p text:style-name="Standard"><draw:rect text:anchor-type="as-char" style:rel-width="100%" draw:z-index="0" draw:style-name="gr1" draw:text-style-name="P24" svg:width="16.511cm" svg:height="0.054cm"><text:p/></draw:rect><text:bookmark-end text:name="synergia-cms-pro-real"/><text:bookmark-end text:name="Xd6a32007c6b024fc01b82d4b33ac3171ae92395"/></text:p>
      <text:h text:style-name="Heading_20_1" text:outline-level="1"><text:bookmark-start text:name="introducción"/>INTRODUCCIÓN</text:h>
      <text:p text:style-name="First_20_Paragraph">SYNERGIA CMS PRO REAL es una evolución de un sistema experimental de generación web hacia una plataforma visual completa tipo:</text:p>
      <text:list xml:id="list2653466522" text:style-name="WWNum1001">
        <text:list-item>
          <text:p text:style-name="P1">Elementor</text:p>
        </text:list-item>
        <text:list-item>
          <text:p text:style-name="P1">WordPress Builder</text:p>
        </text:list-item>
        <text:list-item>
          <text:p text:style-name="P1">Webflow</text:p>
        </text:list-item>
        <text:list-item>
          <text:p text:style-name="P1">Framer</text:p>
        </text:list-item>
        <text:list-item>
          <text:p text:style-name="P1">Bricks Builder</text:p>
        </text:list-item>
      </text:list>
      <text:p text:style-name="First_20_Paragraph">La arquitectura fue diseñada para:</text:p>
      <text:list xml:id="list165348820731605" text:continue-list="list2653466522" text:style-name="WWNum1002">
        <text:list-item>
          <text:p text:style-name="P2">Generar sitios dinámicos</text:p>
        </text:list-item>
        <text:list-item>
          <text:p text:style-name="P2">Renderizar páginas desde JSON</text:p>
        </text:list-item>
        <text:list-item>
          <text:p text:style-name="P2">Permitir edición visual</text:p>
        </text:list-item>
        <text:list-item>
          <text:p text:style-name="P2">Crear templates reutilizables</text:p>
        </text:list-item>
        <text:list-item>
          <text:p text:style-name="P2">Integrar IA generativa</text:p>
        </text:list-item>
        <text:list-item>
          <text:p text:style-name="P2">Exportar sitios completos</text:p>
        </text:list-item>
        <text:list-item>
          <text:p text:style-name="P2">Crear un SaaS multi-cliente</text:p>
        </text:list-item>
      </text:list>
      <text:p text:style-name="Standard"><draw:rect text:anchor-type="as-char" style:rel-width="100%" draw:z-index="1" draw:style-name="gr1" draw:text-style-name="P24" svg:width="16.511cm" svg:height="0.054cm"><text:p/></draw:rect><text:bookmark-end text:name="introducción"/></text:p>
      <text:h text:style-name="Heading_20_1" text:outline-level="1"><text:bookmark-start text:name="objetivo-principal"/>OBJETIVO PRINCIPAL</text:h>
      <text:p text:style-name="First_20_Paragraph">Crear una plataforma visual profesional capaz de:</text:p>
      <text:list xml:id="list165350121970032" text:continue-list="list165348820731605" text:style-name="WWNum1003">
        <text:list-item>
          <text:p text:style-name="P3">generar sitios completos</text:p>
        </text:list-item>
        <text:list-item>
          <text:p text:style-name="P3">administrar páginas</text:p>
        </text:list-item>
        <text:list-item>
          <text:p text:style-name="P3">manejar bloques visuales</text:p>
        </text:list-item>
        <text:list-item>
          <text:p text:style-name="P3">renderizar HTML dinámico</text:p>
        </text:list-item>
        <text:list-item>
          <text:p text:style-name="P3">trabajar con IA</text:p>
        </text:list-item>
        <text:list-item>
          <text:p text:style-name="P3">exportar proyectos reales</text:p>
        </text:list-item>
        <text:list-item>
          <text:p text:style-name="P3"><text:soft-page-break/>permitir edición manual y automática</text:p>
        </text:list-item>
      </text:list>
      <text:p text:style-name="Standard"><draw:rect text:anchor-type="as-char" style:rel-width="100%" draw:z-index="2" draw:style-name="gr1" draw:text-style-name="P24" svg:width="16.511cm" svg:height="0.054cm"><text:p/></draw:rect><text:bookmark-end text:name="objetivo-principal"/></text:p>
      <text:h text:style-name="Heading_20_1" text:outline-level="1"><text:bookmark-start text:name="estructura-general-del-proyecto"/>ESTRUCTURA GENERAL DEL PROYECTO</text:h>
      <text:p text:style-name="Source_20_Code"><text:span text:style-name="NormalTok">SYNERGIA_CORE_NEXT/</text:span><text:line-break/><text:span text:style-name="NormalTok">│</text:span><text:line-break/><text:span text:style-name="NormalTok">├── ai/</text:span><text:line-break/><text:span text:style-name="NormalTok">├── api/</text:span><text:line-break/><text:span text:style-name="NormalTok">├── backend/</text:span><text:line-break/><text:span text:style-name="NormalTok">├── blocks/</text:span><text:line-break/><text:span text:style-name="NormalTok">├── core/</text:span><text:line-break/><text:span text:style-name="NormalTok">├── docs/</text:span><text:line-break/><text:span text:style-name="NormalTok">├── editor/</text:span><text:line-break/><text:span text:style-name="NormalTok">├── frontend/</text:span><text:line-break/><text:span text:style-name="NormalTok">├── json_engine/</text:span><text:line-break/><text:span text:style-name="NormalTok">├── projects/</text:span><text:line-break/><text:span text:style-name="NormalTok">├── render/</text:span><text:line-break/><text:span text:style-name="NormalTok">├── storage/</text:span><text:line-break/><text:span text:style-name="NormalTok">├── templates/</text:span><text:line-break/><text:span text:style-name="NormalTok">└── tests/</text:span></text:p>
      <text:p text:style-name="Standard"><draw:rect text:anchor-type="as-char" style:rel-width="100%" draw:z-index="3" draw:style-name="gr1" draw:text-style-name="P24" svg:width="16.511cm" svg:height="0.054cm"><text:p/></draw:rect><text:bookmark-end text:name="estructura-general-del-proyecto"/></text:p>
      <text:h text:style-name="Heading_20_1" text:outline-level="1"><text:bookmark-start text:name="sistema-cms-visual"/>SISTEMA CMS VISUAL</text:h>
      <text:h text:style-name="Heading_20_2" text:outline-level="2"><text:bookmark-start text:name="arquitectura-actual"/>Arquitectura actual</text:h>
      <text:p text:style-name="Source_20_Code"><text:span text:style-name="NormalTok">EDITOR VISUAL</text:span><text:line-break/><text:span text:style-name="NormalTok"> <text:s text:c="3"/>↓</text:span><text:line-break/><text:span text:style-name="NormalTok">JSON</text:span><text:line-break/><text:span text:style-name="NormalTok"> <text:s text:c="3"/>↓</text:span><text:line-break/><text:span text:style-name="NormalTok">FASTAPI</text:span><text:line-break/><text:span text:style-name="NormalTok"> <text:s text:c="3"/>↓</text:span><text:line-break/><text:span text:style-name="NormalTok">PROJECTS/</text:span><text:line-break/><text:span text:style-name="NormalTok"> <text:s text:c="3"/>↓</text:span><text:line-break/><text:span text:style-name="NormalTok">RENDER ENGINE</text:span><text:line-break/><text:span text:style-name="NormalTok"> <text:s text:c="3"/>↓</text:span><text:line-break/><text:span text:style-name="NormalTok">HTML FINAL</text:span></text:p>
      <text:p text:style-name="Standard"><draw:rect text:anchor-type="as-char" style:rel-width="100%" draw:z-index="4" draw:style-name="gr1" draw:text-style-name="P24" svg:width="16.511cm" svg:height="0.054cm"><text:p/></draw:rect><text:bookmark-end text:name="sistema-cms-visual"/><text:bookmark-end text:name="arquitectura-actual"/></text:p>
      <text:h text:style-name="Heading_20_1" text:outline-level="1"><text:bookmark-start text:name="estructura-de-proyectos"/>ESTRUCTURA DE PROYECTOS</text:h>
      <text:p text:style-name="Source_20_Code"><text:span text:style-name="NormalTok">projects/</text:span><text:line-break/><text:span text:style-name="NormalTok">└── demo_site/</text:span><text:line-break/><text:soft-page-break/><text:span text:style-name="NormalTok"> <text:s text:c="3"/>├── page.json</text:span><text:line-break/><text:span text:style-name="NormalTok"> <text:s text:c="3"/>└── pages/</text:span><text:line-break/><text:span text:style-name="NormalTok"> <text:s text:c="7"/>├── home.json</text:span><text:line-break/><text:span text:style-name="NormalTok"> <text:s text:c="7"/>├── about.json</text:span><text:line-break/><text:span text:style-name="NormalTok"> <text:s text:c="7"/>└── contact.json</text:span></text:p>
      <text:p text:style-name="Standard"><draw:rect text:anchor-type="as-char" style:rel-width="100%" draw:z-index="5" draw:style-name="gr1" draw:text-style-name="P24" svg:width="16.511cm" svg:height="0.054cm"><text:p/></draw:rect><text:bookmark-end text:name="estructura-de-proyectos"/></text:p>
      <text:h text:style-name="Heading_20_1" text:outline-level="1"><text:bookmark-start text:name="formato-de-página"/>FORMATO DE PÁGINA</text:h>
      <text:p text:style-name="First_20_Paragraph">Ejemplo:</text:p>
      <text:p text:style-name="Source_20_Code"><text:span text:style-name="FunctionTok">{</text:span><text:line-break/><text:span text:style-name="NormalTok"> <text:s text:c="3"/></text:span><text:span text:style-name="DataTypeTok">"slug"</text:span><text:span text:style-name="FunctionTok">:</text:span><text:span text:style-name="NormalTok"> </text:span><text:span text:style-name="StringTok">"home"</text:span><text:span text:style-name="FunctionTok">,</text:span><text:line-break/><text:span text:style-name="NormalTok"> <text:s text:c="3"/></text:span><text:span text:style-name="DataTypeTok">"title"</text:span><text:span text:style-name="FunctionTok">:</text:span><text:span text:style-name="NormalTok"> </text:span><text:span text:style-name="StringTok">"Inicio"</text:span><text:span text:style-name="FunctionTok">,</text:span><text:line-break/><text:span text:style-name="NormalTok"> <text:s text:c="3"/></text:span><text:span text:style-name="DataTypeTok">"blocks"</text:span><text:span text:style-name="FunctionTok">:</text:span><text:span text:style-name="NormalTok"> </text:span><text:span text:style-name="OtherTok">[</text:span><text:line-break/><text:span text:style-name="NormalTok"> <text:s text:c="7"/></text:span><text:span text:style-name="FunctionTok">{</text:span><text:line-break/><text:span text:style-name="NormalTok"> <text:s text:c="11"/></text:span><text:span text:style-name="DataTypeTok">"type"</text:span><text:span text:style-name="FunctionTok">:</text:span><text:span text:style-name="NormalTok"> </text:span><text:span text:style-name="StringTok">"hero"</text:span><text:span text:style-name="FunctionTok">,</text:span><text:line-break/><text:span text:style-name="NormalTok"> <text:s text:c="11"/></text:span><text:span text:style-name="DataTypeTok">"data"</text:span><text:span text:style-name="FunctionTok">:</text:span><text:span text:style-name="NormalTok"> </text:span><text:span text:style-name="FunctionTok">{</text:span><text:line-break/><text:span text:style-name="NormalTok"> <text:s text:c="15"/></text:span><text:span text:style-name="DataTypeTok">"title"</text:span><text:span text:style-name="FunctionTok">:</text:span><text:span text:style-name="NormalTok"> </text:span><text:span text:style-name="StringTok">"SYNERGIA CMS"</text:span><text:span text:style-name="FunctionTok">,</text:span><text:line-break/><text:span text:style-name="NormalTok"> <text:s text:c="15"/></text:span><text:span text:style-name="DataTypeTok">"subtitle"</text:span><text:span text:style-name="FunctionTok">:</text:span><text:span text:style-name="NormalTok"> </text:span><text:span text:style-name="StringTok">"Visual AI Builder"</text:span><text:span text:style-name="FunctionTok">,</text:span><text:line-break/><text:span text:style-name="NormalTok"> <text:s text:c="15"/></text:span><text:span text:style-name="DataTypeTok">"button"</text:span><text:span text:style-name="FunctionTok">:</text:span><text:span text:style-name="NormalTok"> </text:span><text:span text:style-name="StringTok">"Comenzar"</text:span><text:line-break/><text:span text:style-name="NormalTok"> <text:s text:c="11"/></text:span><text:span text:style-name="FunctionTok">}</text:span><text:line-break/><text:span text:style-name="NormalTok"> <text:s text:c="7"/></text:span><text:span text:style-name="FunctionTok">}</text:span><text:line-break/><text:span text:style-name="NormalTok"> <text:s text:c="3"/></text:span><text:span text:style-name="OtherTok">]</text:span><text:line-break/><text:span text:style-name="FunctionTok">}</text:span></text:p>
      <text:p text:style-name="Standard"><draw:rect text:anchor-type="as-char" style:rel-width="100%" draw:z-index="6" draw:style-name="gr1" draw:text-style-name="P24" svg:width="16.511cm" svg:height="0.054cm"><text:p/></draw:rect><text:bookmark-end text:name="formato-de-página"/></text:p>
      <text:h text:style-name="Heading_20_1" text:outline-level="1"><text:bookmark-start text:name="block-system"/>BLOCK SYSTEM</text:h>
      <text:p text:style-name="First_20_Paragraph">El sistema utiliza bloques dinámicos.</text:p>
      <text:p text:style-name="Text_20_body">Cada bloque contiene:</text:p>
      <text:list xml:id="list165350057162629" text:continue-list="list165350121970032" text:style-name="WWNum1004">
        <text:list-item>
          <text:p text:style-name="P4">HTML</text:p>
        </text:list-item>
        <text:list-item>
          <text:p text:style-name="P4">placeholders</text:p>
        </text:list-item>
        <text:list-item>
          <text:p text:style-name="P4">estilos</text:p>
        </text:list-item>
        <text:list-item>
          <text:p text:style-name="P4">metadata</text:p>
        </text:list-item>
        <text:list-item>
          <text:p text:style-name="P4">campos editables</text:p>
        </text:list-item>
      </text:list>
      <text:p text:style-name="First_20_Paragraph">Ejemplo:</text:p>
      <text:p text:style-name="Source_20_Code"><text:span text:style-name="NormalTok">hero</text:span><text:span text:style-name="OperatorTok">:</text:span><text:span text:style-name="NormalTok"> </text:span><text:span text:style-name="VerbatimStringTok">`</text:span><text:line-break/><text:span text:style-name="VerbatimStringTok">&lt;section class="hero"&gt;</text:span><text:line-break/><text:span text:style-name="VerbatimStringTok"> <text:s text:c="3"/>&lt;h1&gt;{{title}}&lt;/h1&gt;</text:span><text:line-break/><text:soft-page-break/><text:span text:style-name="VerbatimStringTok">&lt;/section&gt;</text:span><text:line-break/><text:span text:style-name="VerbatimStringTok">`</text:span></text:p>
      <text:p text:style-name="Standard"><draw:rect text:anchor-type="as-char" style:rel-width="100%" draw:z-index="7" draw:style-name="gr1" draw:text-style-name="P24" svg:width="16.511cm" svg:height="0.054cm"><text:p/></draw:rect><text:bookmark-end text:name="block-system"/></text:p>
      <text:h text:style-name="Heading_20_1" text:outline-level="1"><text:bookmark-start text:name="bloques-implementados"/>BLOQUES IMPLEMENTADOS</text:h>
      <text:p text:style-name="First_20_Paragraph">Actualmente:</text:p>
      <text:list xml:id="list165349449319717" text:continue-list="list165350057162629" text:style-name="WWNum1005">
        <text:list-item>
          <text:p text:style-name="P5">Hero</text:p>
        </text:list-item>
        <text:list-item>
          <text:p text:style-name="P5">Navbar</text:p>
        </text:list-item>
        <text:list-item>
          <text:p text:style-name="P5">Footer</text:p>
        </text:list-item>
        <text:list-item>
          <text:p text:style-name="P5">Cards</text:p>
        </text:list-item>
      </text:list>
      <text:p text:style-name="First_20_Paragraph">En expansión:</text:p>
      <text:list xml:id="list165350525626733" text:continue-list="list165349449319717" text:style-name="WWNum1006">
        <text:list-item>
          <text:p text:style-name="P6">Gallery</text:p>
        </text:list-item>
        <text:list-item>
          <text:p text:style-name="P6">Testimonials</text:p>
        </text:list-item>
        <text:list-item>
          <text:p text:style-name="P6">Contact Forms</text:p>
        </text:list-item>
        <text:list-item>
          <text:p text:style-name="P6">Pricing</text:p>
        </text:list-item>
        <text:list-item>
          <text:p text:style-name="P6">FAQ</text:p>
        </text:list-item>
        <text:list-item>
          <text:p text:style-name="P6">Blog</text:p>
        </text:list-item>
        <text:list-item>
          <text:p text:style-name="P6">Ecommerce</text:p>
        </text:list-item>
        <text:list-item>
          <text:p text:style-name="P6">Sliders</text:p>
        </text:list-item>
        <text:list-item>
          <text:p text:style-name="P6">Video</text:p>
        </text:list-item>
        <text:list-item>
          <text:p text:style-name="P6">Maps</text:p>
        </text:list-item>
        <text:list-item>
          <text:p text:style-name="P6">WhatsApp Floating</text:p>
        </text:list-item>
      </text:list>
      <text:p text:style-name="Standard"><draw:rect text:anchor-type="as-char" style:rel-width="100%" draw:z-index="8" draw:style-name="gr1" draw:text-style-name="P24" svg:width="16.511cm" svg:height="0.054cm"><text:p/></draw:rect><text:bookmark-end text:name="bloques-implementados"/></text:p>
      <text:h text:style-name="Heading_20_1" text:outline-level="1"><text:bookmark-start text:name="panel-visual-cms"/>PANEL VISUAL CMS</text:h>
      <text:h text:style-name="Heading_20_2" text:outline-level="2"><text:bookmark-start text:name="características-actuales"/>Características actuales</text:h>
      <text:list xml:id="list165350478715842" text:continue-list="list165350525626733" text:style-name="WWNum1007">
        <text:list-item>
          <text:p text:style-name="P7">agregar bloques</text:p>
        </text:list-item>
        <text:list-item>
          <text:p text:style-name="P7">eliminar bloques</text:p>
        </text:list-item>
        <text:list-item>
          <text:p text:style-name="P7">preview en vivo</text:p>
        </text:list-item>
        <text:list-item>
          <text:p text:style-name="P7">guardado JSON</text:p>
        </text:list-item>
        <text:list-item>
          <text:p text:style-name="P7">render dinámico</text:p>
        </text:list-item>
        <text:list-item>
          <text:p text:style-name="P7">backend FastAPI</text:p>
        </text:list-item>
        <text:list-item>
          <text:p text:style-name="P7"><text:soft-page-break/>iframe live render</text:p>
        </text:list-item>
      </text:list>
      <text:p text:style-name="Standard"><draw:rect text:anchor-type="as-char" style:rel-width="100%" draw:z-index="9" draw:style-name="gr1" draw:text-style-name="P24" svg:width="16.511cm" svg:height="0.054cm"><text:p/></draw:rect><text:bookmark-end text:name="panel-visual-cms"/><text:bookmark-end text:name="características-actuales"/></text:p>
      <text:h text:style-name="Heading_20_1" text:outline-level="1"><text:bookmark-start text:name="backend-fastapi"/>BACKEND FASTAPI</text:h>
      <text:h text:style-name="Heading_20_2" text:outline-level="2"><text:bookmark-start text:name="api-principal"/>API principal</text:h>
      <text:h text:style-name="Heading_20_3" text:outline-level="3"><text:bookmark-start text:name="obtener-página"/>Obtener página</text:h>
      <text:p text:style-name="Source_20_Code"><text:span text:style-name="NormalTok">GET </text:span><text:span text:style-name="OperatorTok">/</text:span><text:span text:style-name="NormalTok">page</text:span><text:span text:style-name="OperatorTok">/</text:span><text:span text:style-name="NormalTok">{project}</text:span><text:span text:style-name="OperatorTok">/</text:span><text:span text:style-name="NormalTok">{page}</text:span><text:bookmark-end text:name="obtener-página"/></text:p>
      <text:h text:style-name="Heading_20_3" text:outline-level="3"><text:bookmark-start text:name="guardar-página"/>Guardar página</text:h>
      <text:p text:style-name="Source_20_Code"><text:span text:style-name="NormalTok">POST </text:span><text:span text:style-name="OperatorTok">/</text:span><text:span text:style-name="NormalTok">page</text:span><text:span text:style-name="OperatorTok">/</text:span><text:span text:style-name="NormalTok">save</text:span></text:p>
      <text:p text:style-name="Standard"><draw:rect text:anchor-type="as-char" style:rel-width="100%" draw:z-index="10" draw:style-name="gr1" draw:text-style-name="P24" svg:width="16.511cm" svg:height="0.054cm"><text:p/></draw:rect><text:bookmark-end text:name="backend-fastapi"/><text:bookmark-end text:name="api-principal"/><text:bookmark-end text:name="guardar-página"/></text:p>
      <text:h text:style-name="Heading_20_1" text:outline-level="1"><text:bookmark-start text:name="render-engine"/>RENDER ENGINE</text:h>
      <text:h text:style-name="Heading_20_2" text:outline-level="2"><text:bookmark-start text:name="función-principal"/>Función principal</text:h>
      <text:p text:style-name="Source_20_Code"><text:span text:style-name="NormalTok">engine.build_site(</text:span><text:span text:style-name="StringTok">"demo_site"</text:span><text:span text:style-name="NormalTok">)</text:span></text:p>
      <text:p text:style-name="First_20_Paragraph">Genera:</text:p>
      <text:p text:style-name="Source_20_Code"><text:span text:style-name="NormalTok">storage/output/</text:span></text:p>
      <text:p text:style-name="First_20_Paragraph">con:</text:p>
      <text:list xml:id="list165350032670187" text:continue-list="list165350478715842" text:style-name="WWNum1008">
        <text:list-item>
          <text:p text:style-name="P8">index.html</text:p>
        </text:list-item>
        <text:list-item>
          <text:p text:style-name="P8">about.html</text:p>
        </text:list-item>
        <text:list-item>
          <text:p text:style-name="P8">contact.html</text:p>
        </text:list-item>
      </text:list>
      <text:p text:style-name="Standard"><draw:rect text:anchor-type="as-char" style:rel-width="100%" draw:z-index="11" draw:style-name="gr1" draw:text-style-name="P24" svg:width="16.511cm" svg:height="0.054cm"><text:p/></draw:rect><text:bookmark-end text:name="render-engine"/><text:bookmark-end text:name="función-principal"/></text:p>
      <text:h text:style-name="Heading_20_1" text:outline-level="1"><text:bookmark-start text:name="sistema-de-render"/>SISTEMA DE RENDER</text:h>
      <text:p text:style-name="First_20_Paragraph">Proceso:</text:p>
      <text:p text:style-name="Source_20_Code"><text:span text:style-name="NormalTok">JSON</text:span><text:line-break/><text:span text:style-name="NormalTok"> <text:s/>↓</text:span><text:line-break/><text:span text:style-name="NormalTok">Blocks</text:span><text:line-break/><text:span text:style-name="NormalTok"> <text:s/>↓</text:span><text:line-break/><text:span text:style-name="NormalTok">Replace variables</text:span><text:line-break/><text:span text:style-name="NormalTok"> <text:s/>↓</text:span><text:line-break/><text:span text:style-name="NormalTok">HTML final</text:span></text:p>
      <text:p text:style-name="Standard"><text:soft-page-break/><draw:rect text:anchor-type="as-char" style:rel-width="100%" draw:z-index="12" draw:style-name="gr1" draw:text-style-name="P24" svg:width="16.511cm" svg:height="0.054cm"><text:p/></draw:rect><text:bookmark-end text:name="sistema-de-render"/></text:p>
      <text:h text:style-name="Heading_20_1" text:outline-level="1"><text:bookmark-start text:name="estructura-futura-de-bloques"/>ESTRUCTURA FUTURA DE BLOQUES</text:h>
      <text:p text:style-name="First_20_Paragraph">Objetivo:</text:p>
      <text:p text:style-name="Source_20_Code"><text:span text:style-name="NormalTok">blocks/</text:span><text:line-break/><text:span text:style-name="NormalTok"> <text:s text:c="3"/>hero/</text:span><text:line-break/><text:span text:style-name="NormalTok"> <text:s text:c="7"/>template.html</text:span><text:line-break/><text:span text:style-name="NormalTok"> <text:s text:c="7"/>style.css</text:span><text:line-break/><text:span text:style-name="NormalTok"> <text:s text:c="7"/>meta.json</text:span><text:line-break/><text:line-break/><text:span text:style-name="NormalTok"> <text:s text:c="3"/>cards/</text:span><text:line-break/><text:span text:style-name="NormalTok"> <text:s text:c="3"/>footer/</text:span></text:p>
      <text:p text:style-name="Standard"><draw:rect text:anchor-type="as-char" style:rel-width="100%" draw:z-index="13" draw:style-name="gr1" draw:text-style-name="P24" svg:width="16.511cm" svg:height="0.054cm"><text:p/></draw:rect><text:bookmark-end text:name="estructura-futura-de-bloques"/></text:p>
      <text:h text:style-name="Heading_20_1" text:outline-level="1"><text:bookmark-start text:name="meta.json"/>META.JSON</text:h>
      <text:p text:style-name="First_20_Paragraph">Cada bloque tendrá:</text:p>
      <text:p text:style-name="Source_20_Code"><text:span text:style-name="FunctionTok">{</text:span><text:line-break/><text:span text:style-name="NormalTok"> <text:s/></text:span><text:span text:style-name="DataTypeTok">"name"</text:span><text:span text:style-name="FunctionTok">:</text:span><text:span text:style-name="NormalTok"> </text:span><text:span text:style-name="StringTok">"Hero Modern"</text:span><text:span text:style-name="FunctionTok">,</text:span><text:line-break/><text:span text:style-name="NormalTok"> <text:s/></text:span><text:span text:style-name="DataTypeTok">"category"</text:span><text:span text:style-name="FunctionTok">:</text:span><text:span text:style-name="NormalTok"> </text:span><text:span text:style-name="StringTok">"hero"</text:span><text:span text:style-name="FunctionTok">,</text:span><text:line-break/><text:span text:style-name="NormalTok"> <text:s/></text:span><text:span text:style-name="DataTypeTok">"editable"</text:span><text:span text:style-name="FunctionTok">:</text:span><text:span text:style-name="NormalTok"> </text:span><text:span text:style-name="KeywordTok">true</text:span><text:span text:style-name="FunctionTok">,</text:span><text:line-break/><text:span text:style-name="NormalTok"> <text:s/></text:span><text:span text:style-name="DataTypeTok">"fields"</text:span><text:span text:style-name="FunctionTok">:</text:span><text:span text:style-name="NormalTok"> </text:span><text:span text:style-name="OtherTok">[</text:span><text:line-break/><text:span text:style-name="NormalTok"> <text:s text:c="3"/></text:span><text:span text:style-name="FunctionTok">{</text:span><text:line-break/><text:span text:style-name="NormalTok"> <text:s text:c="5"/></text:span><text:span text:style-name="DataTypeTok">"id"</text:span><text:span text:style-name="FunctionTok">:</text:span><text:span text:style-name="NormalTok"> </text:span><text:span text:style-name="StringTok">"title"</text:span><text:span text:style-name="FunctionTok">,</text:span><text:line-break/><text:span text:style-name="NormalTok"> <text:s text:c="5"/></text:span><text:span text:style-name="DataTypeTok">"type"</text:span><text:span text:style-name="FunctionTok">:</text:span><text:span text:style-name="NormalTok"> </text:span><text:span text:style-name="StringTok">"text"</text:span><text:line-break/><text:span text:style-name="NormalTok"> <text:s text:c="3"/></text:span><text:span text:style-name="FunctionTok">}</text:span><text:line-break/><text:span text:style-name="NormalTok"> <text:s/></text:span><text:span text:style-name="OtherTok">]</text:span><text:line-break/><text:span text:style-name="FunctionTok">}</text:span></text:p>
      <text:p text:style-name="Standard"><draw:rect text:anchor-type="as-char" style:rel-width="100%" draw:z-index="14" draw:style-name="gr1" draw:text-style-name="P24" svg:width="16.511cm" svg:height="0.054cm"><text:p/></draw:rect><text:bookmark-end text:name="meta.json"/></text:p>
      <text:h text:style-name="Heading_20_1" text:outline-level="1"><text:bookmark-start text:name="visual-editor-futuro"/>VISUAL EDITOR FUTURO</text:h>
      <text:p text:style-name="First_20_Paragraph">Objetivo:</text:p>
      <text:list xml:id="list165349630097882" text:continue-list="list165350032670187" text:style-name="WWNum1009">
        <text:list-item>
          <text:p text:style-name="P9">drag &amp; drop</text:p>
        </text:list-item>
        <text:list-item>
          <text:p text:style-name="P9">resize</text:p>
        </text:list-item>
        <text:list-item>
          <text:p text:style-name="P9">visual spacing</text:p>
        </text:list-item>
        <text:list-item>
          <text:p text:style-name="P9">typography</text:p>
        </text:list-item>
        <text:list-item>
          <text:p text:style-name="P9">responsive editor</text:p>
        </text:list-item>
        <text:list-item>
          <text:p text:style-name="P9"><text:soft-page-break/>animations</text:p>
        </text:list-item>
        <text:list-item>
          <text:p text:style-name="P9">theme editor</text:p>
        </text:list-item>
        <text:list-item>
          <text:p text:style-name="P9">visual padding</text:p>
        </text:list-item>
        <text:list-item>
          <text:p text:style-name="P9">live styles</text:p>
        </text:list-item>
      </text:list>
      <text:p text:style-name="Standard"><draw:rect text:anchor-type="as-char" style:rel-width="100%" draw:z-index="15" draw:style-name="gr1" draw:text-style-name="P24" svg:width="16.511cm" svg:height="0.054cm"><text:p/></draw:rect><text:bookmark-end text:name="visual-editor-futuro"/></text:p>
      <text:h text:style-name="Heading_20_1" text:outline-level="1"><text:bookmark-start text:name="template-engine"/>TEMPLATE ENGINE</text:h>
      <text:p text:style-name="First_20_Paragraph">Objetivo:</text:p>
      <text:p text:style-name="Source_20_Code"><text:span text:style-name="NormalTok">templates/</text:span><text:line-break/><text:span text:style-name="NormalTok"> <text:s text:c="3"/>restaurant/</text:span><text:line-break/><text:span text:style-name="NormalTok"> <text:s text:c="3"/>agency/</text:span><text:line-break/><text:span text:style-name="NormalTok"> <text:s text:c="3"/>ecommerce/</text:span><text:line-break/><text:span text:style-name="NormalTok"> <text:s text:c="3"/>gym/</text:span><text:line-break/><text:span text:style-name="NormalTok"> <text:s text:c="3"/>medical/</text:span></text:p>
      <text:p text:style-name="First_20_Paragraph">Cada template tendrá:</text:p>
      <text:list xml:id="list165349084963104" text:continue-list="list165349630097882" text:style-name="WWNum1010">
        <text:list-item>
          <text:p text:style-name="P10">layouts</text:p>
        </text:list-item>
        <text:list-item>
          <text:p text:style-name="P10">themes</text:p>
        </text:list-item>
        <text:list-item>
          <text:p text:style-name="P10">sections</text:p>
        </text:list-item>
        <text:list-item>
          <text:p text:style-name="P10">pages</text:p>
        </text:list-item>
        <text:list-item>
          <text:p text:style-name="P10">assets</text:p>
        </text:list-item>
        <text:list-item>
          <text:p text:style-name="P10">presets</text:p>
        </text:list-item>
      </text:list>
      <text:p text:style-name="Standard"><draw:rect text:anchor-type="as-char" style:rel-width="100%" draw:z-index="16" draw:style-name="gr1" draw:text-style-name="P24" svg:width="16.511cm" svg:height="0.054cm"><text:p/></draw:rect><text:bookmark-end text:name="template-engine"/></text:p>
      <text:h text:style-name="Heading_20_1" text:outline-level="1"><text:bookmark-start text:name="ia-generativa"/>IA GENERATIVA</text:h>
      <text:p text:style-name="First_20_Paragraph">Futuro sistema:</text:p>
      <text:p text:style-name="Source_20_Code"><text:span text:style-name="NormalTok">"crear sitio premium para gimnasio"</text:span></text:p>
      <text:p text:style-name="First_20_Paragraph">Resultado:</text:p>
      <text:list xml:id="list165348878401177" text:continue-list="list165349084963104" text:style-name="WWNum1011">
        <text:list-item>
          <text:p text:style-name="P11">genera páginas</text:p>
        </text:list-item>
        <text:list-item>
          <text:p text:style-name="P11">genera estructura</text:p>
        </text:list-item>
        <text:list-item>
          <text:p text:style-name="P11">selecciona bloques</text:p>
        </text:list-item>
        <text:list-item>
          <text:p text:style-name="P11">genera textos</text:p>
        </text:list-item>
        <text:list-item>
          <text:p text:style-name="P11">genera imágenes</text:p>
        </text:list-item>
        <text:list-item>
          <text:p text:style-name="P11">renderiza sitio completo</text:p>
        </text:list-item>
      </text:list>
      <text:p text:style-name="Standard"><text:soft-page-break/><draw:rect text:anchor-type="as-char" style:rel-width="100%" draw:z-index="17" draw:style-name="gr1" draw:text-style-name="P24" svg:width="16.511cm" svg:height="0.054cm"><text:p/></draw:rect><text:bookmark-end text:name="ia-generativa"/></text:p>
      <text:h text:style-name="Heading_20_1" text:outline-level="1"><text:bookmark-start text:name="sistema-saas"/>SISTEMA SaaS</text:h>
      <text:p text:style-name="First_20_Paragraph">Objetivo final:</text:p>
      <text:list xml:id="list165349171377188" text:continue-list="list165348878401177" text:style-name="WWNum1012">
        <text:list-item>
          <text:p text:style-name="P12">multi cliente</text:p>
        </text:list-item>
        <text:list-item>
          <text:p text:style-name="P12">multi proyecto</text:p>
        </text:list-item>
        <text:list-item>
          <text:p text:style-name="P12">panel admin</text:p>
        </text:list-item>
        <text:list-item>
          <text:p text:style-name="P12">login</text:p>
        </text:list-item>
        <text:list-item>
          <text:p text:style-name="P12">billing</text:p>
        </text:list-item>
        <text:list-item>
          <text:p text:style-name="P12">hosting</text:p>
        </text:list-item>
        <text:list-item>
          <text:p text:style-name="P12">export automático</text:p>
        </text:list-item>
        <text:list-item>
          <text:p text:style-name="P12">publicación automática</text:p>
        </text:list-item>
      </text:list>
      <text:p text:style-name="Standard"><draw:rect text:anchor-type="as-char" style:rel-width="100%" draw:z-index="18" draw:style-name="gr1" draw:text-style-name="P24" svg:width="16.511cm" svg:height="0.054cm"><text:p/></draw:rect><text:bookmark-end text:name="sistema-saas"/></text:p>
      <text:h text:style-name="Heading_20_1" text:outline-level="1"><text:bookmark-start text:name="export-engine"/>EXPORT ENGINE</text:h>
      <text:p text:style-name="First_20_Paragraph">Objetivo:</text:p>
      <text:p text:style-name="Source_20_Code"><text:span text:style-name="NormalTok">output/site/</text:span></text:p>
      <text:p text:style-name="First_20_Paragraph">con:</text:p>
      <text:list xml:id="list165348920570151" text:continue-list="list165349171377188" text:style-name="WWNum1013">
        <text:list-item>
          <text:p text:style-name="P13">html</text:p>
        </text:list-item>
        <text:list-item>
          <text:p text:style-name="P13">css</text:p>
        </text:list-item>
        <text:list-item>
          <text:p text:style-name="P13">js</text:p>
        </text:list-item>
        <text:list-item>
          <text:p text:style-name="P13">assets</text:p>
        </text:list-item>
        <text:list-item>
          <text:p text:style-name="P13">seo</text:p>
        </text:list-item>
        <text:list-item>
          <text:p text:style-name="P13">sitemap</text:p>
        </text:list-item>
        <text:list-item>
          <text:p text:style-name="P13">robots</text:p>
        </text:list-item>
        <text:list-item>
          <text:p text:style-name="P13">metadata</text:p>
        </text:list-item>
        <text:list-item>
          <text:p text:style-name="P13">analytics</text:p>
        </text:list-item>
      </text:list>
      <text:p text:style-name="Standard"><draw:rect text:anchor-type="as-char" style:rel-width="100%" draw:z-index="19" draw:style-name="gr1" draw:text-style-name="P24" svg:width="16.511cm" svg:height="0.054cm"><text:p/></draw:rect><text:bookmark-end text:name="export-engine"/></text:p>
      <text:h text:style-name="Heading_20_1" text:outline-level="1"><text:bookmark-start text:name="arquitectura-técnica"/><text:soft-page-break/>ARQUITECTURA TÉCNICA</text:h>
      <text:h text:style-name="Heading_20_2" text:outline-level="2"><text:bookmark-start text:name="frontend"/>Frontend</text:h>
      <text:list xml:id="list165348814349296" text:continue-list="list165348920570151" text:style-name="WWNum1014">
        <text:list-item>
          <text:p text:style-name="P14">HTML</text:p>
        </text:list-item>
        <text:list-item>
          <text:p text:style-name="P14">CSS</text:p>
        </text:list-item>
        <text:list-item>
          <text:p text:style-name="P14">JavaScript</text:p>
        </text:list-item>
        <text:list-item>
          <text:p text:style-name="P14">iframe render</text:p>
        </text:list-item>
        <text:list-item>
          <text:p text:style-name="P14">visual editor<text:bookmark-end text:name="frontend"/></text:p>
        </text:list-item>
      </text:list>
      <text:h text:style-name="Heading_20_2" text:outline-level="2"><text:bookmark-start text:name="backend"/>Backend</text:h>
      <text:list xml:id="list165349812966801" text:continue-list="list165348814349296" text:style-name="WWNum1015">
        <text:list-item>
          <text:p text:style-name="P15">Python</text:p>
        </text:list-item>
        <text:list-item>
          <text:p text:style-name="P15">FastAPI</text:p>
        </text:list-item>
        <text:list-item>
          <text:p text:style-name="P15">JSON Engine</text:p>
        </text:list-item>
        <text:list-item>
          <text:p text:style-name="P15">Render Engine<text:bookmark-end text:name="backend"/></text:p>
        </text:list-item>
      </text:list>
      <text:h text:style-name="Heading_20_2" text:outline-level="2"><text:bookmark-start text:name="persistencia"/>Persistencia</text:h>
      <text:list xml:id="list165349430197645" text:continue-list="list165349812966801" text:style-name="WWNum1016">
        <text:list-item>
          <text:p text:style-name="P16">JSON pages</text:p>
        </text:list-item>
        <text:list-item>
          <text:p text:style-name="P16">blocks</text:p>
        </text:list-item>
        <text:list-item>
          <text:p text:style-name="P16">templates</text:p>
        </text:list-item>
        <text:list-item>
          <text:p text:style-name="P16">assets</text:p>
        </text:list-item>
      </text:list>
      <text:p text:style-name="Standard"><draw:rect text:anchor-type="as-char" style:rel-width="100%" draw:z-index="20" draw:style-name="gr1" draw:text-style-name="P24" svg:width="16.511cm" svg:height="0.054cm"><text:p/></draw:rect><text:bookmark-end text:name="arquitectura-técnica"/><text:bookmark-end text:name="persistencia"/></text:p>
      <text:h text:style-name="Heading_20_1" text:outline-level="1"><text:bookmark-start text:name="roadmap"/>ROADMAP</text:h>
      <text:h text:style-name="Heading_20_2" text:outline-level="2"><text:bookmark-start text:name="etapa-1"/>ETAPA 1</text:h>
      <text:p text:style-name="First_20_Paragraph">✅ editor visual básico ✅ bloques dinámicos ✅ preview ✅ backend ✅ JSON save<text:bookmark-end text:name="etapa-1"/></text:p>
      <text:h text:style-name="Heading_20_2" text:outline-level="2"><text:bookmark-start text:name="etapa-2"/>ETAPA 2</text:h>
      <text:list xml:id="list165348836095277" text:continue-list="list165349430197645" text:style-name="WWNum1017">
        <text:list-item>
          <text:p text:style-name="P17">drag &amp; drop</text:p>
        </text:list-item>
        <text:list-item>
          <text:p text:style-name="P17">reorder blocks</text:p>
        </text:list-item>
        <text:list-item>
          <text:p text:style-name="P17">visual properties<text:bookmark-end text:name="etapa-2"/></text:p>
        </text:list-item>
      </text:list>
      <text:h text:style-name="Heading_20_2" text:outline-level="2"><text:bookmark-start text:name="etapa-3"/>ETAPA 3</text:h>
      <text:list xml:id="list165349359918276" text:continue-list="list165348836095277" text:style-name="WWNum1018">
        <text:list-item>
          <text:p text:style-name="P18">template marketplace</text:p>
        </text:list-item>
        <text:list-item>
          <text:p text:style-name="P18">themes</text:p>
        </text:list-item>
        <text:list-item>
          <text:p text:style-name="P18"><text:soft-page-break/>assets manager<text:bookmark-end text:name="etapa-3"/></text:p>
        </text:list-item>
      </text:list>
      <text:h text:style-name="Heading_20_2" text:outline-level="2"><text:bookmark-start text:name="etapa-4"/>ETAPA 4</text:h>
      <text:list xml:id="list165349592636013" text:continue-list="list165349359918276" text:style-name="WWNum1019">
        <text:list-item>
          <text:p text:style-name="P19">IA generadora</text:p>
        </text:list-item>
        <text:list-item>
          <text:p text:style-name="P19">autocomposición</text:p>
        </text:list-item>
        <text:list-item>
          <text:p text:style-name="P19">diseño automático<text:bookmark-end text:name="etapa-4"/></text:p>
        </text:list-item>
      </text:list>
      <text:h text:style-name="Heading_20_2" text:outline-level="2"><text:bookmark-start text:name="etapa-5"/>ETAPA 5</text:h>
      <text:list xml:id="list165350394496769" text:continue-list="list165349592636013" text:style-name="WWNum1020">
        <text:list-item>
          <text:p text:style-name="P20">SaaS multi usuario</text:p>
        </text:list-item>
        <text:list-item>
          <text:p text:style-name="P20">export cloud</text:p>
        </text:list-item>
        <text:list-item>
          <text:p text:style-name="P20">publicación automática</text:p>
        </text:list-item>
      </text:list>
      <text:p text:style-name="Standard"><draw:rect text:anchor-type="as-char" style:rel-width="100%" draw:z-index="21" draw:style-name="gr1" draw:text-style-name="P24" svg:width="16.511cm" svg:height="0.054cm"><text:p/></draw:rect><text:bookmark-end text:name="roadmap"/><text:bookmark-end text:name="etapa-5"/></text:p>
      <text:h text:style-name="Heading_20_1" text:outline-level="1"><text:bookmark-start text:name="conclusión"/>CONCLUSIÓN</text:h>
      <text:p text:style-name="First_20_Paragraph">SYNERGIA CMS PRO REAL dejó de ser una prueba experimental.</text:p>
      <text:p text:style-name="Text_20_body">La plataforma ya posee:</text:p>
      <text:list text:continue-list="list165350394496769" text:style-name="WWNum1021">
        <text:list-item>
          <text:p text:style-name="P21">arquitectura modular</text:p>
        </text:list-item>
        <text:list-item>
          <text:p text:style-name="P21">render dinámico</text:p>
        </text:list-item>
        <text:list-item>
          <text:p text:style-name="P21">backend real</text:p>
        </text:list-item>
        <text:list-item>
          <text:p text:style-name="P21">editor visual</text:p>
        </text:list-item>
        <text:list-item>
          <text:p text:style-name="P21">sistema de bloques</text:p>
        </text:list-item>
        <text:list-item>
          <text:p text:style-name="P21">preview vivo</text:p>
        </text:list-item>
        <text:list-item>
          <text:p text:style-name="P21">estructura SaaS escalable</text:p>
        </text:list-item>
      </text:list>
      <text:p text:style-name="First_20_Paragraph">La siguiente etapa consiste en transformar el sistema en un constructor visual avanzado con IA integrada.</text:p>
      <text:p text:style-name="Standard"><draw:rect text:anchor-type="as-char" style:rel-width="100%" draw:z-index="22" draw:style-name="gr1" draw:text-style-name="P24" svg:width="16.511cm" svg:height="0.054cm"><text:p/></draw:rect><text:bookmark-end text:name="conclusión"/></text:p>
      <text:h text:style-name="Heading_20_1" text:outline-level="1"><text:bookmark-start text:name="autor"/>AUTOR</text:h>
      <text:p text:style-name="First_20_Paragraph">Gerardo Bergoglio — GAB</text:p>
      <text:p text:style-name="Text_20_body">Proyecto:</text:p>
      <text:p text:style-name="Text_20_body">SYNERGIA CORE NEXT SYNERGIA CMS PRO REAL Córdoba — Argentina<text:bookmark-end text:name="autor"/></text:p>
      <text:h text:style-name="Heading_20_1" text:outline-level="1"><text:soft-page-break/>SYNERGIA CMS PRO REAL</text:h>
      <text:p text:style-name="Text_20_body">Incluye:</text:p>
      <text:list text:style-name="L1">
        <text:list-item>
          <text:p text:style-name="P23">arquitectura </text:p>
        </text:list-item>
        <text:list-item>
          <text:p text:style-name="P23">backend </text:p>
        </text:list-item>
        <text:list-item>
          <text:p text:style-name="P23">render engine </text:p>
        </text:list-item>
        <text:list-item>
          <text:p text:style-name="P23">block system </text:p>
        </text:list-item>
        <text:list-item>
          <text:p text:style-name="P23">JSON pages </text:p>
        </text:list-item>
        <text:list-item>
          <text:p text:style-name="P23">editor visual </text:p>
        </text:list-item>
        <text:list-item>
          <text:p text:style-name="P23">roadmap </text:p>
        </text:list-item>
        <text:list-item>
          <text:p text:style-name="P23">IA generativa </text:p>
        </text:list-item>
        <text:list-item>
          <text:p text:style-name="P23">SaaS futuro </text:p>
        </text:list-item>
        <text:list-item>
          <text:p text:style-name="P23">templates </text:p>
        </text:list-item>
        <text:list-item>
          <text:p text:style-name="P23">export engine </text:p>
        </text:list-item>
        <text:list-item>
          <text:p text:style-name="P22">estructura completa </text:p>
        </text:list-item>
      </text:list>
      <text:p text:style-name="Text_20_body">y toda la evolución del proyecto hasta el estado actual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0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1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8T19:48:22</meta:creation-date>
    <dc:date>2026-05-08T16:53:48.009529411</dc:date>
    <meta:generator>LibreOffice/24.2.7.2$Linux_X86_64 LibreOffice_project/420$Build-2</meta:generator>
    <meta:editing-duration>PT7M48S</meta:editing-duration>
    <meta:editing-cycles>1</meta:editing-cycles>
    <meta:document-statistic meta:table-count="0" meta:image-count="0" meta:object-count="0" meta:page-count="11" meta:paragraph-count="240" meta:word-count="725" meta:character-count="4517" meta:non-whitespace-character-count="3860"/>
    <meta:user-defined meta:name="AppVersion">12.0000</meta:user-defined>
    <meta:template xlink:type="simple" xlink:actuate="onRequest" xlink:title="Normal.dotm" xlink:href=""/>
  </office:meta>
</office:document-meta>
</file>